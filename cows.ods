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20000171609002113508C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20000174007002416806C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2000017160A02341770626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0000174007005019704BD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20000174007019116806D7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200001740070048171065C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2000017400701221D407A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20000174007023916606DD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20000174007109419105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200001716090282129097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2000017400701221D407A17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0T19:01:29.072803769</meta:creation-date>
    <dc:date>2026-06-20T21:11:24.354682767</dc:date>
    <meta:editing-duration>PT1H36M13S</meta:editing-duration>
    <meta:editing-cycles>1</meta:editing-cycles>
    <meta:document-statistic meta:table-count="1" meta:cell-count="22" meta:object-count="0"/>
    <meta:generator>LibreOffice/24.2.7.2$Linux_X86_64 LibreOffice_project/420$Build-2</meta:generator>
  </office:meta>
</office:document-meta>
</file>